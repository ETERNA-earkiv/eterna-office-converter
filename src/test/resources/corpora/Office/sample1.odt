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 office:version="1.2">
  <office:automatic-styles/>
  <office:body>
    <office:text>
      <text:h text:outline-level="1">Office Converter ODT Sample</text:h>
      <text:p>This is a sample ODT file for testing LibreOffice/UNO conversions.</text:p>
      <text:p>Includes UTF-8 characters: ₹ € 漢字 العربية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 office:version="1.2">
  <office:meta>
    <meta:generator>ODFPY/1.4.1</meta:generator>
  </office:meta>
</office:document-meta>
</file>